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2" style:parent-style-name="Шрифтабзацузазамовчуванням" style:family="text">
      <style:text-properties style:text-position="sub 58.3%"/>
    </style:style>
    <style:style style:name="T3" style:parent-style-name="Шрифтабзацузазамовчуванням" style:family="text">
      <style:text-properties style:text-position="sub 60%"/>
    </style:style>
    <style:style style:name="T4" style:parent-style-name="Шрифтабзацузазамовчуванням" style:family="text">
      <style:text-properties fo:font-style="italic" style:font-style-asian="italic" style:font-style-complex="italic"/>
    </style:style>
    <style:style style:name="T5" style:parent-style-name="Шрифтабзацузазамовчуванням" style:family="text">
      <style:text-properties fo:font-style="italic" style:font-style-asian="italic" style:font-style-complex="italic"/>
    </style:style>
    <style:style style:name="T6" style:parent-style-name="Шрифтабзацузазамовчуванням" style:family="text">
      <style:text-properties fo:font-style="italic" style:font-style-asian="italic" style:font-style-complex="italic"/>
    </style:style>
    <style:style style:name="T7" style:parent-style-name="Шрифтабзацузазамовчуванням" style:family="text">
      <style:text-properties fo:font-style="italic" style:font-style-asian="italic" style:font-style-complex="italic"/>
    </style:style>
    <style:style style:name="T8" style:parent-style-name="Шрифтабзацузазамовчуванням" style:family="text">
      <style:text-properties fo:font-style="italic" style:font-style-asian="italic" style:font-style-complex="italic"/>
    </style:style>
    <style:style style:name="T9" style:parent-style-name="Шрифтабзацузазамовчуванням" style:family="text">
      <style:text-properties fo:font-style="italic" style:font-style-asian="italic" style:font-style-complex="italic"/>
    </style:style>
    <style:style style:name="T10" style:parent-style-name="Шрифтабзацузазамовчуванням" style:family="text">
      <style:text-properties fo:font-style="italic" style:font-style-asian="italic" style:font-style-complex="italic"/>
    </style:style>
    <style:style style:name="T11" style:parent-style-name="Шрифтабзацузазамовчуванням" style:family="text">
      <style:text-properties fo:font-style="italic" style:font-style-asian="italic" style:font-style-complex="italic"/>
    </style:style>
    <style:style style:name="T12" style:parent-style-name="Шрифтабзацузазамовчуванням" style:family="text">
      <style:text-properties fo:font-style="italic" style:font-style-asian="italic" style:font-style-complex="italic"/>
    </style:style>
    <style:style style:name="T13" style:parent-style-name="Шрифтабзацузазамовчуванням" style:family="text">
      <style:text-properties fo:font-style="italic" style:font-style-asian="italic" style:font-style-complex="italic"/>
    </style:style>
    <style:style style:name="T14" style:parent-style-name="Шрифтабзацузазамовчуванням" style:family="text">
      <style:text-properties fo:font-style="italic" style:font-style-asian="italic" style:font-style-complex="italic"/>
    </style:style>
    <style:style style:name="T15" style:parent-style-name="Шрифтабзацузазамовчуванням" style:family="text">
      <style:text-properties fo:font-style="italic" style:font-style-asian="italic" style:font-style-complex="italic"/>
    </style:style>
    <style:style style:name="P16" style:parent-style-name="Звичайний" style:family="paragraph">
      <style:paragraph-properties fo:text-align="center"/>
    </style:style>
    <style:style style:name="T17" style:parent-style-name="Шрифтабзацузазамовчуванням" style:family="text">
      <style:text-properties style:text-position="sub 58.3%"/>
    </style:style>
    <style:style style:name="T18" style:parent-style-name="Шрифтабзацузазамовчуванням" style:family="text">
      <style:text-properties fo:font-style="italic" style:font-style-asian="italic" style:font-style-complex="italic"/>
    </style:style>
    <style:style style:name="T19" style:parent-style-name="Шрифтабзацузазамовчуванням" style:family="text">
      <style:text-properties fo:font-style="italic" style:font-style-asian="italic" style:font-style-complex="italic"/>
    </style:style>
    <style:style style:name="P20" style:parent-style-name="Звичайний" style:family="paragraph">
      <style:paragraph-properties fo:text-align="center"/>
    </style:style>
    <style:style style:name="P21" style:parent-style-name="Звичайний" style:family="paragraph">
      <style:paragraph-properties fo:text-align="center"/>
    </style:style>
    <style:style style:name="T22" style:parent-style-name="Шрифтабзацузазамовчуванням" style:family="text">
      <style:text-properties fo:font-style="italic" style:font-style-asian="italic" style:font-style-complex="italic"/>
    </style:style>
    <style:style style:name="T23" style:parent-style-name="Шрифтабзацузазамовчуванням" style:family="text">
      <style:text-properties style:text-position="sub 58.3%"/>
    </style:style>
    <style:style style:name="P24" style:parent-style-name="Звичайний" style:family="paragraph">
      <style:paragraph-properties fo:text-align="center"/>
    </style:style>
    <style:style style:name="P25" style:parent-style-name="Звичайний" style:family="paragraph">
      <style:paragraph-properties fo:break-before="page"/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P26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P27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8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0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1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2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3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P34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5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6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P37" style:parent-style-name="Звичайний" style:family="paragraph">
      <style:paragraph-properties fo:text-align="center"/>
    </style:style>
    <style:style style:name="P38" style:parent-style-name="Звичайний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BJD_TDB Converted Plug-in</text:h>
      <text:p text:style-name="Звичайний">The plug-in converts loaded observations to the<text:s/>HJD<text:span text:style-name="T2">TDB</text:span><text:s/>time scale<text:span text:style-name="Знаквиноски"><text:note text:note-class="footnote" text:id="_ftn0"><text:note-citation>1</text:note-citation><text:note-body><text:p text:style-name="Текствиноски"><text:s/>You can find a comprehensive discussion of the various astronomical time scales and the significance of HJD<text:span text:style-name="T3">TDB</text:span><text:s/>here:<text:s/><text:a xlink:href="https://ui.adsabs.harvard.edu/abs/2010PASP..122..935E/abstract" office:target-frame-name="_top" xlink:show="replace"><text:span text:style-name="Гіперпосилання">https://ui.adsabs.harvard.edu/abs/2010PASP..122..935E/abstract</text:span></text:a></text:p></text:note-body></text:note></text:span>.<text:s/>It<text:s/>recalculates<text:s/>the timestamps<text:s/>for<text:s/>both JD and HJD observations using the appropriate conversion<text:s/>algorithms.</text:p>
      <text:p text:style-name="Звичайний">The plug-in uses a local Python-based microservice. Please see the Appendix for information on how to install and configure it.To install the<text:s/><text:span text:style-name="T4">BJD_TDB Converter</text:span><text:s/>plug-in, go to the<text:s/><text:span text:style-name="T5">Tools</text:span><text:s/>menu in VStar and select<text:s/><text:span text:style-name="T6">Plug-in Manager</text:span>. Scroll through the list of available plug-ins, select<text:s/><text:span text:style-name="T7">BJD_TDB Converter</text:span>, and click the<text:s/><text:span text:style-name="T8">Install</text:span><text:s/>button. After installation, restart VStar.</text:p>
      <text:p text:style-name="Звичайний">As an example, load PMAK V5 data in the Johnson V filter for JD between 2458037 and 2458670: go to the<text:s/><text:span text:style-name="T9">File</text:span><text:s/>menu, select<text:s/><text:span text:style-name="T10">New Star from AAVSO Database</text:span>, enter 'PMAK V5' in the<text:s/><text:span text:style-name="T11">Star</text:span><text:s/>field, and set<text:s/><text:span text:style-name="T12">Minimum JD</text:span><text:s/>to 2458037 and<text:s/><text:span text:style-name="T13">Maximum JD</text:span><text:s/>to 2458670. Ensure that the 'Johnson V' checkbox is selected and all others are unchecked, then click OK.<draw:frame draw:style-name="a0" draw:name="drawing" text:anchor-type="as-char" svg:x="0in" svg:y="0in" svg:width="6.5in" svg:height="2.95833in" style:rel-width="scale" style:rel-height="scale"><draw:image xlink:href="media/image1.png" xlink:type="simple" xlink:show="embed" xlink:actuate="onLoad"/><svg:title/><svg:desc/></draw:frame></text:p>
      <text:p text:style-name="Звичайний">After loading the light curve, you can select a point and use the<text:s/><text:span text:style-name="T14">View</text:span><text:s/>-&gt;<text:s/><text:span text:style-name="T15">Observation Details</text:span><text:s/>menu command to verify that the observations are in the JD time scale:</text:p>
      <text:soft-page-break/>
      <text:p text:style-name="P16"><draw:frame draw:style-name="a1" draw:name="drawing" text:anchor-type="as-char" svg:x="0in" svg:y="0in" svg:width="6.5in" svg:height="4.44792in" style:rel-width="scale" style:rel-height="scale"><draw:image xlink:href="media/image2.png" xlink:type="simple" xlink:show="embed" xlink:actuate="onLoad"/><svg:title/><svg:desc/></draw:frame></text:p>
      <text:p text:style-name="Звичайний">To convert the observation times to<text:s/>HJD<text:span text:style-name="T17">TDB</text:span>, use<text:s/>the<text:s/><text:span text:style-name="T18">Tools -&gt; BJD_TDB Converte</text:span><text:span text:style-name="T19">r</text:span><text:s/>command. The following dialog will appear:</text:p>
      <text:p text:style-name="P20"><draw:frame draw:style-name="a2" draw:name="drawing" text:anchor-type="as-char" svg:x="0in" svg:y="0in" svg:width="4.11516in" svg:height="0.94805in" style:rel-width="scale" style:rel-height="scale"><draw:image xlink:href="media/image3.png" xlink:type="simple" xlink:show="embed" xlink:actuate="onLoad"/><svg:title/><svg:desc/></draw:frame></text:p>
      <text:p text:style-name="Звичайний">Click OK. After a brief delay, an information dialog will appear:</text:p>
      <text:p text:style-name="P21"><draw:frame draw:style-name="a3" draw:name="drawing" text:anchor-type="as-char" svg:x="0in" svg:y="0in" svg:width="2.72955in" svg:height="1.25017in" style:rel-width="scale" style:rel-height="scale"><draw:image xlink:href="media/image4.png" xlink:type="simple" xlink:show="embed" xlink:actuate="onLoad"/><svg:title/><svg:desc/></draw:frame></text:p>
      <text:p text:style-name="Звичайний">Use<text:s/><text:span text:style-name="T22">View-&gt;Observation Details<text:s/></text:span>again.<text:s/>You should see that the observations are now in the BJD<text:span text:style-name="T23">TDB</text:span><text:s/>time scale:</text:p>
      <text:soft-page-break/>
      <text:p text:style-name="P24"><draw:frame draw:style-name="a4" draw:name="drawing" text:anchor-type="as-char" svg:x="0in" svg:y="0in" svg:width="5.99042in" svg:height="4.80275in" style:rel-width="scale" style:rel-height="scale"><draw:image xlink:href="media/image5.png" xlink:type="simple" xlink:show="embed" xlink:actuate="onLoad"/><svg:title/><svg:desc/></draw:frame></text:p>
      <text:p text:style-name="Звичайний"/>
      <text:p text:style-name="P25"/>
      <text:soft-page-break/>
      <text:p text:style-name="P26">Appendix. Installing the Local Microservice</text:p>
      <text:p text:style-name="P27">Prerequisites:<text:s/>Install Python 3.11<text:s/>or higher. Then, install AstroPy and Flask packages.<text:s/>This can be done with the pip utils:</text:p>
      <text:p text:style-name="P28">&gt;pip install astropy</text:p>
      <text:p text:style-name="P29">&gt;pip install flask</text:p>
      <text:p text:style-name="P30">The<text:s/>Python microservice ‘astro_time_convert.py’ is<text:s/>located<text:s/>in the ‘PyMicroService’ subfolder<text:s/>within the ‘vstar’ folder.<text:s/>Run it with the command:</text:p>
      <text:p text:style-name="P31">&gt;python astro_time_convert.py</text:p>
      <text:p text:style-name="P32">Once the microservice launches successfully, you should see something like the following:</text:p>
      <text:p text:style-name="P33"><draw:frame draw:style-name="a5" draw:name="Рисунок 1" text:anchor-type="as-char" svg:x="0in" svg:y="0in" svg:width="6.5in" svg:height="2.21736in" style:rel-width="scale" style:rel-height="scale"><draw:image xlink:href="media/image6.png" xlink:type="simple" xlink:show="embed" xlink:actuate="onLoad"/><svg:title/><svg:desc>Зображення, що містить текст, програмне забезпечення, Мультимедійне програмне забезпечення, Веб-сторінка

Вміст на основі ШІ може бути неправильним.</svg:desc></draw:frame></text:p>
      <text:p text:style-name="P34">You may ignore the warning; it simply means that you are running a single-threaded internal Flask web server, which is perfectly sufficient for our needs.</text:p>
      <text:p text:style-name="P35">To test the microservice, run VStar, load some data (for example, V405 Dra, all times, Johnson V). Invoke the [Tools] -&gt; [BJD_TDB Converter] command and press OK.</text:p>
      <text:soft-page-break/>
      <text:p text:style-name="P36"><draw:frame draw:style-name="a6" draw:name="Рисунок 3" text:anchor-type="as-char" svg:x="0in" svg:y="0in" svg:width="6.5in" svg:height="4.19028in" style:rel-width="scale" style:rel-height="scale"><draw:image xlink:href="media/image7.png" xlink:type="simple" xlink:show="embed" xlink:actuate="onLoad"/><svg:title/><svg:desc>Зображення, що містить текст, знімок екрана, програмне забезпечення, монітор

Вміст на основі ШІ може бути неправильним.</svg:desc></draw:frame></text:p>
      <text:p text:style-name="Звичайний">In a few seconds, you should see the following message (number of observations may differ):</text:p>
      <text:p text:style-name="P37"><draw:frame draw:style-name="a7" draw:name="Рисунок 4" text:anchor-type="as-char" svg:x="0in" svg:y="0in" svg:width="3.33333in" svg:height="2.11319in" style:rel-width="scale" style:rel-height="scale"><draw:image xlink:href="media/image8.png" xlink:type="simple" xlink:show="embed" xlink:actuate="onLoad"/><svg:title/><svg:desc>Зображення, що містить текст, знімок екрана, Шрифт

Вміст на основі ШІ може бути неправильним.</svg:desc></draw:frame></text:p>
      <text:p text:style-name="P38"/>
      <text:soft-page-break/>
      <text:p text:style-name="Звичайний">Maksym Pyatnytskyy</text:p>
      <text:p text:style-name="Звичайний">Rev<text:s/>B, 2026-06-07</text:p>
      <text:p text:style-name="Звичайний">Rev A, 2025-06-19</text:p>
      <text:p text:style-name="Звичайний"/>
      <text:p text:style-name="Звичайни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Звичайний" style:next-style-name="Звичайни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Звичайний" style:next-style-name="Звичайни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Звичайний" style:next-style-name="Звичайни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Звичайний" style:next-style-name="Звичайни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Звичайний" style:next-style-name="Звичайни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Заголовок1Знак" style:display-name="Заголовок 1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Шрифтабзацузазамовчуванням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Шрифтабзацузазамовчуванням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Шрифтабзацузазамовчуванням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Шрифтабзацузазамовчуванням">
      <style:text-properties style:font-name-asian="Times New Roman" style:font-name-complex="Times New Roman" fo:color="#272727"/>
    </style:style>
    <style:style style:name="НазваЗнак" style:display-name="Назва Знак" style:family="text" style:parent-style-name="Шрифтабзацузазамовчуванням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Назва" style:display-name="Назва" style:family="paragraph" style:parent-style-name="Звичайний" style:next-style-name="Звичайни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ПідзаголовокЗнак" style:display-name="Підзаголовок Знак" style:family="text" style:parent-style-name="Шрифтабзацузазамовчуванням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Підзаголовок" style:display-name="Підзаголовок" style:family="paragraph" style:parent-style-name="Звичайний" style:next-style-name="Звичайни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Сильневиокремлення" style:display-name="Сильне виокремлення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ЦитатаЗнак" style:display-name="Цитата Знак" style:family="text" style:parent-style-name="Шрифтабзацузазамовчуванням">
      <style:text-properties fo:font-style="italic" style:font-style-asian="italic" style:font-style-complex="italic" fo:color="#404040"/>
    </style:style>
    <style:style style:name="Цитата" style:display-name="Цитата" style:family="paragraph" style:parent-style-name="Звичайний" style:next-style-name="Звичайни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НасиченацитатаЗнак" style:display-name="Насичена цитата Знак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Насиченацитата" style:display-name="Насичена цитата" style:family="paragraph" style:parent-style-name="Звичайний" style:next-style-name="Звичайни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Сильнепосилання" style:display-name="Сильне посилання" style:family="text" style:parent-style-name="Шрифтабзацузазамовчуванням">
      <style:text-properties fo:font-weight="bold" style:font-weight-asian="bold" style:font-weight-complex="bold" fo:font-variant="small-caps" fo:color="#0F4761" fo:letter-spacing="0.0034in"/>
    </style:style>
    <style:style style:name="Текствиноски" style:display-name="Текст виноски" style:family="paragraph" style:parent-style-name="Звичайний">
      <style:paragraph-properties fo:margin-bottom="0in" fo:line-height="100%"/>
      <style:text-properties fo:font-size="10pt" style:font-size-asian="10pt" style:font-size-complex="10pt" fo:hyphenate="false"/>
    </style:style>
    <style:style style:name="Гіперпосилання" style:display-name="Гіперпосилання" style:family="text" style:parent-style-name="Шрифтабзацузазамовчуванням">
      <style:text-properties fo:color="#467886" style:text-underline-type="single" style:text-underline-style="solid" style:text-underline-width="auto" style:text-underline-mode="continuous"/>
    </style:style>
    <style:style style:name="Знаквиноски" style:display-name="Знак виноски" style:family="text" style:parent-style-name="Шрифтабзацузазамовчуванням">
      <style:text-properties style:text-position="super 58.3%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style:style style:name="Абзацсписку" style:display-name="Абзац списку" style:family="paragraph" style:parent-style-name="Звичайни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citation-style-name="Знаквиноски" text:citation-body-style-name="Знакви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ksym Pyatnytskyy</meta:initial-creator>
    <dc:creator>Maksym Pyatnytskyy</dc:creator>
    <meta:creation-date>2026-06-07T12:44:00Z</meta:creation-date>
    <dc:date>2026-06-07T12:44:00Z</dc:date>
    <meta:print-date>2026-06-07T12:43:00Z</meta:print-date>
    <meta:template xlink:href="Normal.dotm" xlink:type="simple"/>
    <meta:editing-cycles>2</meta:editing-cycles>
    <meta:editing-duration>PT60S</meta:editing-duration>
    <meta:document-statistic meta:page-count="6" meta:paragraph-count="20" meta:word-count="360" meta:character-count="2307" meta:row-count="43" meta:non-whitespace-character-count="1967"/>
  </office:meta>
</office:document-meta>
</file>